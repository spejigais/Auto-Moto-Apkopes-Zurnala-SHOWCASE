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officeooo:rsid="000ae9d0" officeooo:paragraph-rsid="000ae9d0"/>
    </style:style>
    <style:style style:name="P2" style:family="paragraph" style:parent-style-name="Text_20_body">
      <style:paragraph-properties fo:text-align="center" style:justify-single-word="false"/>
      <style:text-properties fo:font-size="14pt" fo:font-weight="bold" officeooo:rsid="000ae9d0" officeooo:paragraph-rsid="000ae9d0" style:font-size-asian="14pt" style:font-weight-asian="bold" style:font-size-complex="14pt" style:font-weight-complex="bold"/>
    </style:style>
    <style:style style:name="P3" style:family="paragraph" style:parent-style-name="Standard">
      <style:text-properties fo:font-weight="bold"/>
    </style:style>
    <style:style style:name="P4" style:family="paragraph" style:parent-style-name="Text_20_body" style:list-style-name="L1">
      <style:text-properties fo:font-weight="bold"/>
    </style:style>
    <style:style style:name="P5" style:family="paragraph" style:parent-style-name="Text_20_body" style:list-style-name="L1">
      <style:text-properties officeooo:paragraph-rsid="0010babc"/>
    </style:style>
    <style:style style:name="P6" style:family="paragraph" style:parent-style-name="Text_20_body" style:list-style-name="L2">
      <style:text-properties officeooo:paragraph-rsid="001ae6d6"/>
    </style:style>
    <style:style style:name="P7" style:family="paragraph" style:parent-style-name="Text_20_body" style:list-style-name="L3"/>
    <style:style style:name="P8" style:family="paragraph" style:parent-style-name="Text_20_body" style:list-style-name="L2">
      <style:text-properties fo:font-weight="normal" officeooo:paragraph-rsid="001ae6d6" style:font-weight-asian="normal" style:font-weight-complex="normal"/>
    </style:style>
    <style:style style:name="P9" style:family="paragraph" style:parent-style-name="Text_20_body" style:list-style-name="L1"/>
    <style:style style:name="P10" style:family="paragraph" style:parent-style-name="Text_20_body" style:list-style-name="L1">
      <style:text-properties fo:font-style="normal" style:font-style-asian="normal" style:font-style-complex="normal"/>
    </style:style>
    <style:style style:name="P11" style:family="paragraph" style:parent-style-name="Text_20_body" style:list-style-name="L4">
      <style:text-properties fo:font-style="normal" style:font-style-asian="normal" style:font-style-complex="normal"/>
    </style:style>
    <style:style style:name="P12" style:family="paragraph" style:parent-style-name="Text_20_body" style:list-style-name="L4">
      <style:text-properties officeooo:paragraph-rsid="00247af0"/>
    </style:style>
    <style:style style:name="P13" style:family="paragraph" style:parent-style-name="Standard" style:list-style-name="L4">
      <style:text-properties officeooo:paragraph-rsid="00247af0"/>
    </style:style>
    <style:style style:name="P14" style:family="paragraph" style:parent-style-name="Standard" style:list-style-name="L4">
      <style:text-properties fo:font-style="normal" officeooo:rsid="000db52d" officeooo:paragraph-rsid="0022de89" style:font-style-asian="normal" style:font-style-complex="normal"/>
    </style:style>
    <style:style style:name="P15" style:family="paragraph" style:parent-style-name="Standard">
      <style:text-properties fo:font-style="normal" officeooo:rsid="000db52d" officeooo:paragraph-rsid="0022de89" style:font-style-asian="normal" style:font-style-complex="normal"/>
    </style:style>
    <style:style style:name="P16" style:family="paragraph" style:parent-style-name="Standard" style:list-style-name="L4">
      <style:text-properties fo:font-style="italic"/>
    </style:style>
    <style:style style:name="P17" style:family="paragraph" style:parent-style-name="Standard" style:list-style-name="L4">
      <style:text-properties fo:font-style="normal" officeooo:rsid="000db52d" style:font-style-asian="normal" style:font-style-complex="normal"/>
    </style:style>
    <style:style style:name="P18" style:family="paragraph" style:parent-style-name="Text_20_body" style:list-style-name="L5"/>
    <style:style style:name="P19" style:family="paragraph" style:parent-style-name="Text_20_body" style:list-style-name="L1">
      <style:text-properties fo:color="#c9211e" loext:opacity="100%" officeooo:paragraph-rsid="000bd23a" fo:background-color="#ffff00"/>
    </style:style>
    <style:style style:name="P20" style:family="paragraph" style:parent-style-name="Text_20_body" style:list-style-name="L1">
      <style:text-properties style:use-window-font-color="true" loext:opacity="0%" fo:background-color="#ffff00"/>
    </style:style>
    <style:style style:name="P21" style:family="paragraph" style:parent-style-name="Text_20_body" style:list-style-name="L6">
      <style:text-properties fo:font-weight="normal" style:font-weight-asian="normal" style:font-weight-complex="normal"/>
    </style:style>
    <style:style style:name="P22" style:family="paragraph" style:parent-style-name="Text_20_body" style:list-style-name="L6">
      <style:text-properties fo:font-weight="normal" officeooo:paragraph-rsid="00265a2b" style:font-weight-asian="normal" style:font-weight-complex="normal"/>
    </style:style>
    <style:style style:name="P23" style:family="paragraph" style:parent-style-name="Text_20_body" style:list-style-name="L6">
      <style:text-properties fo:font-style="italic" fo:font-weight="normal" officeooo:paragraph-rsid="00265a2b" style:font-weight-asian="normal" style:font-weight-complex="normal"/>
    </style:style>
    <style:style style:name="P24" style:family="paragraph" style:parent-style-name="Standard" style:list-style-name="L6">
      <style:text-properties officeooo:paragraph-rsid="00265a2b"/>
    </style:style>
    <style:style style:name="P25" style:family="paragraph" style:parent-style-name="Text_20_body">
      <style:text-properties fo:font-weight="bold"/>
    </style:style>
    <style:style style:name="P26" style:family="paragraph" style:parent-style-name="Quotations" style:list-style-name="L1">
      <style:paragraph-properties fo:margin-left="0in" fo:text-indent="0in" style:auto-text-indent="false"/>
    </style:style>
    <style:style style:name="P27" style:family="paragraph" style:parent-style-name="Quotations" style:list-style-name="L7">
      <style:paragraph-properties fo:margin-top="0in" fo:margin-bottom="0.0972in" style:contextual-spacing="false" fo:line-height="115%"/>
    </style:style>
    <style:style style:name="P28" style:family="paragraph" style:parent-style-name="Text_20_body" style:list-style-name="L1">
      <style:text-properties officeooo:paragraph-rsid="0025cba3"/>
    </style:style>
    <style:style style:name="P29" style:family="paragraph" style:parent-style-name="Text_20_body" style:list-style-name="L1">
      <style:text-properties officeooo:rsid="000db52d" officeooo:paragraph-rsid="00151486"/>
    </style:style>
    <style:style style:name="P30" style:family="paragraph" style:parent-style-name="Text_20_body" style:list-style-name="L1">
      <style:text-properties officeooo:rsid="000db52d" officeooo:paragraph-rsid="0016fff3"/>
    </style:style>
    <style:style style:name="P31" style:family="paragraph" style:parent-style-name="Text_20_body">
      <style:text-properties officeooo:rsid="000db52d" officeooo:paragraph-rsid="000db52d"/>
    </style:style>
    <style:style style:name="P32" style:family="paragraph" style:parent-style-name="Text_20_body" style:list-style-name="L8">
      <style:paragraph-properties fo:margin-left="0in" fo:margin-right="0in" fo:text-indent="0in" style:auto-text-indent="false"/>
    </style:style>
    <style:style style:name="P33" style:family="paragraph" style:parent-style-name="Text_20_body" style:list-style-name="L8"/>
    <style:style style:name="P34" style:family="paragraph" style:parent-style-name="Text_20_body" style:list-style-name="L8">
      <style:paragraph-properties fo:margin-left="0in" fo:margin-right="0in" fo:text-indent="0in" style:auto-text-indent="false"/>
      <style:text-properties fo:font-style="italic"/>
    </style:style>
    <style:style style:name="P35" style:family="paragraph" style:parent-style-name="Text_20_body" style:list-style-name="L8">
      <style:text-properties fo:font-weight="bold"/>
    </style:style>
    <style:style style:name="P36" style:family="paragraph" style:parent-style-name="Standard" style:list-style-name="L8"/>
    <style:style style:name="P37" style:family="paragraph" style:parent-style-name="Text_20_body" style:list-style-name="L9">
      <style:paragraph-properties fo:margin-left="0in" fo:margin-right="0in" fo:text-indent="0in" style:auto-text-indent="false"/>
    </style:style>
    <style:style style:name="P38" style:family="paragraph" style:parent-style-name="Text_20_body" style:list-style-name="L9">
      <style:paragraph-properties fo:margin-left="0in" fo:margin-right="0in" fo:margin-top="0in" fo:margin-bottom="0in" style:contextual-spacing="false" fo:text-indent="0in" style:auto-text-indent="false"/>
    </style:style>
    <style:style style:name="P39" style:family="paragraph" style:parent-style-name="Text_20_body" style:list-style-name="L9">
      <style:paragraph-properties fo:margin-left="0in" fo:margin-right="0in" fo:margin-top="0in" fo:margin-bottom="0in" style:contextual-spacing="false" fo:text-indent="0in" style:auto-text-indent="false"/>
      <style:text-properties fo:font-weight="normal" style:font-weight-asian="normal" style:font-weight-complex="normal"/>
    </style:style>
    <style:style style:name="P40" style:family="paragraph" style:parent-style-name="Text_20_body" style:list-style-name="L9">
      <style:paragraph-properties fo:margin-left="0in" fo:margin-right="0in" fo:margin-top="0in" fo:margin-bottom="0in" style:contextual-spacing="false" fo:text-indent="0in" style:auto-text-indent="false"/>
      <style:text-properties officeooo:paragraph-rsid="0027c69a"/>
    </style:style>
    <style:style style:name="P41" style:family="paragraph" style:parent-style-name="Text_20_body" style:list-style-name="L10"/>
    <style:style style:name="P42" style:family="paragraph" style:parent-style-name="Text_20_body" style:list-style-name="L9">
      <style:paragraph-properties fo:margin-left="0in" fo:margin-right="0in" fo:margin-top="0in" fo:margin-bottom="0in" style:contextual-spacing="false" fo:text-indent="0in" style:auto-text-indent="false"/>
      <style:text-properties fo:font-weight="bold"/>
    </style:style>
    <style:style style:name="P43" style:family="paragraph" style:parent-style-name="Text_20_body" style:list-style-name="L11">
      <style:paragraph-properties fo:margin-left="0in" fo:margin-right="0in" fo:margin-top="0in" fo:margin-bottom="0in" style:contextual-spacing="false" fo:text-indent="0in" style:auto-text-indent="false"/>
    </style:style>
    <style:style style:name="P44" style:family="paragraph" style:parent-style-name="Text_20_body" style:list-style-name="L11">
      <style:paragraph-properties fo:margin-left="0in" fo:margin-right="0in" fo:margin-top="0in" fo:margin-bottom="0in" style:contextual-spacing="false" fo:text-indent="0in" style:auto-text-indent="false"/>
      <style:text-properties officeooo:paragraph-rsid="001d983e"/>
    </style:style>
    <style:style style:name="T1" style:family="text">
      <style:text-properties fo:font-weight="bold"/>
    </style:style>
    <style:style style:name="T2" style:family="text">
      <style:text-properties fo:font-weight="bold" officeooo:rsid="0010babc"/>
    </style:style>
    <style:style style:name="T3" style:family="text">
      <style:text-properties fo:font-style="italic"/>
    </style:style>
    <style:style style:name="T4" style:family="text">
      <style:text-properties fo:font-weight="normal" style:font-weight-asian="normal" style:font-weight-complex="normal"/>
    </style:style>
    <style:style style:name="T5" style:family="text">
      <style:text-properties officeooo:rsid="0016fff3"/>
    </style:style>
    <style:style style:name="T6" style:family="text">
      <style:text-properties officeooo:rsid="00295e0c"/>
    </style:style>
    <style:style style:name="T7" style:family="text">
      <style:text-properties officeooo:rsid="00265a2b"/>
    </style:style>
    <style:style style:name="T8" style:family="text">
      <style:text-properties fo:font-style="normal" fo:font-weight="bold" style:font-style-asian="normal" style:font-style-complex="normal"/>
    </style:style>
    <style:style style:name="T9" style:family="text">
      <style:text-properties fo:font-style="normal" style:font-style-asian="normal" style:font-style-complex="normal"/>
    </style:style>
    <style:style style:name="T10" style:family="text">
      <style:text-properties fo:font-style="normal" officeooo:rsid="0025cba3" style:font-style-asian="normal" style:font-style-complex="normal"/>
    </style:style>
    <style:style style:name="T11" style:family="text">
      <style:text-properties fo:font-style="normal" fo:font-weight="bold" officeooo:rsid="000db52d" style:font-style-asian="normal" style:font-style-complex="normal"/>
    </style:style>
    <style:style style:name="T12" style:family="text">
      <style:text-properties fo:font-style="normal" officeooo:rsid="000db52d" style:font-style-asian="normal" style:font-style-complex="normal"/>
    </style:style>
    <style:style style:name="T13" style:family="text">
      <style:text-properties fo:font-style="normal" officeooo:rsid="00247af0" style:font-style-asian="normal" style:font-style-complex="normal"/>
    </style:style>
    <style:style style:name="T14" style:family="text">
      <style:text-properties fo:font-style="normal" fo:font-weight="bold" officeooo:rsid="000db52d" style:font-style-asian="normal" style:font-weight-asian="bold" style:font-style-complex="normal" style:font-weight-complex="bold"/>
    </style:style>
    <style:style style:name="T15" style:family="text">
      <style:text-properties officeooo:rsid="000db52d" style:font-style-asian="normal" style:font-style-complex="normal"/>
    </style:style>
    <style:style style:name="T16" style:family="text">
      <style:text-properties officeooo:rsid="000db52d" style:font-style-asian="italic" style:font-style-complex="italic"/>
    </style:style>
    <style:style style:name="T17" style:family="text">
      <style:text-properties officeooo:rsid="0014a3c9"/>
    </style:style>
    <style:style style:name="T18" style:family="text">
      <style:text-properties fo:color="#c9211e" loext:opacity="100%" fo:background-color="#ffff00" loext:char-shading-value="0"/>
    </style:style>
    <style:style style:name="T19" style:family="text">
      <style:text-properties style:use-window-font-color="true" loext:opacity="0%" fo:font-weight="normal" fo:background-color="transparent" loext:char-shading-value="0" style:font-weight-asian="normal" style:font-weight-complex="normal"/>
    </style:style>
    <style:style style:name="T20" style:family="text">
      <style:text-properties style:use-window-font-color="true" loext:opacity="0%" fo:background-color="transparent" loext:char-shading-value="0"/>
    </style:style>
    <style:style style:name="T21" style:family="text"/>
    <style:style style:name="T22" style:family="text">
      <style:text-properties fo:font-style="italic"/>
    </style:style>
    <style:style style:name="T23" style:family="text">
      <style:text-properties style:use-window-font-color="true" loext:opacity="0%" fo:font-weight="bold" fo:background-color="transparent" loext:char-shading-value="0" style:font-weight-asian="bold" style:font-weight-complex="bold"/>
    </style:style>
    <style:style style:name="T24" style:family="text">
      <style:text-properties fo:font-style="italic" fo:font-weight="normal" style:font-weight-asian="normal" style:font-weight-complex="normal"/>
    </style:style>
    <style:style style:name="T25" style:family="text">
      <style:text-properties fo:font-style="italic" fo:font-weight="bold" style:font-weight-asian="normal" style:font-weight-complex="normal"/>
    </style:style>
    <style:style style:name="T26" style:family="text">
      <style:text-properties fo:font-style="italic"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style:font-name="Liberation Mono" fo:font-weight="normal" style:font-weight-asian="normal" style:font-weight-complex="normal"/>
    </style:style>
    <style:style style:name="T29" style:family="text">
      <style:text-properties officeooo:rsid="001be9d9"/>
    </style:style>
    <style:style style:name="T30" style:family="text">
      <style:text-properties fo:font-weight="normal" officeooo:rsid="00208aba" style:font-weight-asian="normal" style:font-weight-complex="normal"/>
    </style:style>
    <style:style style:name="T31" style:family="text">
      <style:text-properties fo:font-weight="bold" style:font-weight-asian="normal"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text:bullet-char="•">
        <style:list-level-properties text:space-before="0.7882in" text:min-label-width="0.1965in"/>
        <style:text-properties style:font-name="OpenSymbol"/>
      </text:list-level-style-bullet>
      <text:list-level-style-bullet text:level="3" text:style-name="Bullet_20_Symbols" text:bullet-char="•">
        <style:list-level-properties text:space-before="1.2807in" text:min-label-width="0.1965in"/>
        <style:text-properties style:font-name="OpenSymbol"/>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D (produkta prasību dokuments)</text:h>
      <text:p text:style-name="P2">Auto un Moto žurnāls</text:p>
      <text:p text:style-name="P3"/>
      <text:p text:style-name="Standard"><text:span text:style-name="T1">1. Produkta mērķis un vīzija (Product Objective &amp; Vision)</text:span> Auto/Moto žurnāls ir responsīva tīmekļa lietotne (web app), kas paredzēta ērtai lietošanai gan no viedtālruņa, gan datora. Tās mērķis ir palīdzēt lietotājiem reģistrēt, izsekot un plānot savu transportlīdzekļu (automašīnu un motociklu) tehniskās apkopes. Sistēma ļauj ērti uzglabāt ar remontu saistīto dokumentāciju (čekus, pavadzīmes) un proaktīvi atvieglo transportlīdzekļa uzturēšanu, aprēķinot un parādot, kad nepieciešama nākamā apkope (eļļas vai siksnas/ķēdes maiņa), kā arī atgādina par tuvojošos tehnisko apskati.</text:p>
      <text:p text:style-name="Standard"/>
      <text:p text:style-name="Text_20_body"><text:span text:style-name="T1">2. Lietotāja profils (User Persona)</text:span> Sistēma ir paredzēta individuāliem transportlīdzekļu īpašniekiem. Katram lietotājam ir savs privāts konts, kurā viņš var pievienot un pārvaldīt vienu vai vairākus savus transportlīdzekļus. Lietotājs redz un var rediģēt tikai savus datus.</text:p>
      <text:p text:style-name="Text_20_body"><text:span text:style-name="T1">3. Lietotnes arhitektūra un Funkcionālās prasības</text:span> Lietotne sastāv no 4 galvenajiem skatiem/lapām:</text:p>
      <text:list xml:id="list2685246654" text:style-name="L1">
        <text:list-item>
          <text:p text:style-name="P4">Lapa 1: Autentifikācija</text:p>
          <text:list>
            <text:list-item>
              <text:p text:style-name="P5">Reģistrācija un pieteikšanās ar e-pastu un paroli.</text:p>
            </text:list-item>
            <text:list-item>
              <text:p text:style-name="P5"><text:span text:style-name="T2">T</text:span><text:span text:style-name="T1">ehnoloģiju steks (Tech Stack)</text:span> AI koda ģeneratoram jāizmanto šādas tehnoloģijas:</text:p>
            </text:list-item>
          </text:list>
        </text:list-item>
      </text:list>
      <text:list xml:id="list4033696859" text:style-name="L2">
        <text:list-item>
          <text:list>
            <text:list-item>
              <text:list>
                <text:list-item>
                  <text:p text:style-name="P6"><text:bookmark text:name="p-rc_351edb17c30f0f22-356"/><text:span text:style-name="T1">Frontend:</text:span> React.</text:p>
                </text:list-item>
                <text:list-item>
                  <text:p text:style-name="P6"><text:bookmark text:name="p-rc_351edb17c30f0f22-357"/><text:span text:style-name="T1">Backend &amp; Datubāze:</text:span> Supabase (PostgreSQL). Lietotne izmanto "Backend-as-a-Service" (BaaS) arhitektūru. Frontend (React) komunicē tieši ar Supabase datubāzi un Storage, izmantojot Supabase JS Client.</text:p>
                </text:list-item>
                <text:list-item>
                  <text:p text:style-name="P6"><text:span text:style-name="T1">Drošība (RLS):</text:span> Koda ģeneratoram OBLIGĀTI jāizveido Supabase Row Level Security (RLS) politikas. Katrai tabulai un Storage spainim jābūt RLS noteikumiem, kas garantē, ka autentificēts lietotājs var veikt CRUD (Create, Read, Update, Delete) darbības TIKAI ar saviem datiem.</text:p>
                </text:list-item>
                <text:list-item>
                  <text:p text:style-name="P6">Datumu matemātikas aprēķiniem (mēnešu pievienošanai un dienu starpības aprēķināšanai) AI obligāti jāizmanto uzticama datumu bibliotēka, piemēram, <text:span text:style-name="Source_20_Text">date-fns</text:span> vai <text:span text:style-name="Source_20_Text">dayjs</text:span>.</text:p>
                </text:list-item>
              </text:list>
            </text:list-item>
            <text:list-item>
              <text:p text:style-name="P6"><text:span text:style-name="T1">Dizains un UI bibliotēka:</text:span> UI izstrādei obligāti jāizmanto <text:span text:style-name="T1">Material UI (MUI)</text:span> komponentes. </text:p>
            </text:list-item>
            <text:list-item>
              <text:p text:style-name="P6"><text:span text:style-name="T1">Dizaina tēma (Theme):</text:span> Lietotnes galvenajai pamatkrāsai (<text:span text:style-name="T3">Primary color</text:span>) jābūt eleganti tumši zaļai (<text:span text:style-name="T1">HEX #003314</text:span>).</text:p>
              <text:list text:style-name="L3">
                <text:list-item>
                  <text:p text:style-name="P7"><text:span text:style-name="T1">Kontrasts pogās un joslās:</text:span> J<text:span text:style-name="T4">ebkuram tekstam vai ikonām, kas atrodas virs šīs pamatkrāsas (piemēram, iekšā pogā "Saglabāt" vai augšējā navigācijas joslā), </text:span><text:span text:style-name="T4">obligāti jābūt baltā krāsā (#FFFFFF)</text:span><text:span text:style-name="T4">, lai nodrošinātu labu salasāmību.</text:span></text:p>
                </text:list-item>
                <text:list-item>
                  <text:p text:style-name="P7"><text:soft-page-break/><text:span text:style-name="T1">Lietotnes fons un pamatteksts:</text:span> Pašas lietotnes fonam (aiz kartītēm un tabulām) jābūt gaišam (baltam vai ļoti gaiši pelēkam), un pamattekstam uz šī gaišā fona jābūt tumši pelēkam vai melnam.</text:p>
                </text:list-item>
              </text:list>
            </text:list-item>
            <text:list-item>
              <text:p text:style-name="P6"><text:span text:style-name="T1">Lietojamība:</text:span> Visai lietotnei obligāti jābūt izstrādātai pēc "Mobile-First" principa. AI koda ģeneratoram automātiski jāpiemēro šādi adaptīvā dizaina un "Touch-Friendly" noteikumi visos lietotnes skatos un modālajos logos:</text:p>
              <text:list>
                <text:list-item>
                  <text:p text:style-name="P6"><text:span text:style-name="T1">Skārienjutīgās zonas (Touch targets):</text:span> Visiem interaktīvajiem elementiem (pogām, ikonām, <text:span text:style-name="T5">checkbox</text:span>, bilžu dzēšanas "X" pogām) mobilajā skatā jābūt ar pietiekami lielu un ērtu skārienjutīgo zonu (vismaz 44x44px rādiusā).</text:p>
                </text:list-item>
                <text:list-item>
                  <text:p text:style-name="P6"><text:span text:style-name="T1">Hover efektu aizstāšana:</text:span> Tā kā viedtālruņos nav peles kursora, mobilajā skatā nedrīkst paļauties uz "hover" (peles uzbraukšanas) efektiem. Visām funkciju pogām (Edit, Delete, X) mobilajā versijā jābūt pastāvīgi un skaidri redzamām.</text:p>
                </text:list-item>
                <text:list-item>
                  <text:p text:style-name="P6"><text:span text:style-name="T1">Adaptīvi komponenti:</text:span> Visiem kompleksajiem UI elementiem, piemēram, brīdinājuma (Confirmation) logiem automātiski jāpielāgojas telefona ekrāna izmēram – tiem jābūt centrētiem, ērti rullējamiem un tie nedrīkst "izlīst" ārpus ekrāna malām.</text:p>
                </text:list-item>
                <text:list-item>
                  <text:p text:style-name="P8"><text:span text:style-name="T6">4. l</text:span>apas modālajam logam (Add/Edit) <text:span text:style-name="T6">m</text:span>obilajā skatā (zem 768px) automātiski jāpārtop par pilnekrāna dialoglogu (MUI Full-screen Dialog), lai lietotājam būtu maksimāli daudz vietas datu, kalendāra un attēlu ievadei.</text:p>
                </text:list-item>
              </text:list>
            </text:list-item>
          </text:list>
        </text:list-item>
      </text:list>
      <text:p text:style-name="Text_20_body"/>
      <text:list xml:id="list223931601758959" text:continue-list="list2685246654" text:style-name="L1">
        <text:list-item>
          <text:p text:style-name="P4">Lapa 2: Galvenais panelis (Dashboard)</text:p>
          <text:list>
            <text:list-item>
              <text:p text:style-name="P9">Atveras pēc ielogošanās un attēlo lietotāja transportlīdzekļus tabulas formā.</text:p>
            </text:list-item>
            <text:list-item>
              <text:p text:style-name="P9"><text:span text:style-name="T1">Tabulas kolonnas:</text:span> Numura zīme (VNZ), Marka/Modelis, Aktuālais nobraukums, Atlikums līdz eļļas maiņai (km un mēneši), Atlikums līdz siksnas/ķēdes maiņai (km un mēneši/gadi), Tehniskās apskates datums.</text:p>
            </text:list-item>
            <text:list-item>
              <text:p text:style-name="P9"><text:span text:style-name="T1">Transportlīdzekļu pievienošana:</text:span> Zem tabulas ir poga "+ Pievienot". To nospiežot, tabulā parādās jauna, tukša rinda. Lietotājs ievada pamata datus: <text:span text:style-name="T7">Tips (izvēlne: Auto vai Moto),</text:span> VNZ, Marka/Modelis, TA datums un saglabā. Lai pievienotu intervālus un pirmo nobraukumu, lietotājs uzklikšķina uz šīs jaunās rindas un pāriet uz 3. lapu.</text:p>
            </text:list-item>
            <text:list-item>
              <text:p text:style-name="P9"><text:span text:style-name="T1">Transportlīdzekļu dzēšana:</text:span> Katras rindas beigās ir dzēšanas poga. Nospiežot to, izlec apstiprinājuma logs: <text:span text:style-name="T3">"Vai tiešām vēlaties dzēst [VNZ Marka/Modelis]?"</text:span></text:p>
            </text:list-item>
            <text:list-item>
              <text:p text:style-name="P10"><text:span text:style-name="T1">Mobilais skats (UI/UX Responsīvais dizains):</text:span> Ekrāniem, kas ir šaurāki par 768px (viedtālruņos), standarta tabula transformējas par vertikāli rullējamu "kartīšu" sarakstu, lai datus būtu ērti pārskatīt.</text:p>
            </text:list-item>
          </text:list>
        </text:list-item>
      </text:list>
      <text:list text:style-name="L4">
        <text:list-item>
          <text:list>
            <text:list-item>
              <text:list>
                <text:list-item>
                  <text:p text:style-name="P11">Katram transportlīdzeklim ir sava atsevišķa kartīte.</text:p>
                </text:list-item>
                <text:list-item>
                  <text:p text:style-name="P11">Kartītes augšpusē lieliem burtiem izcelts VNZ un Marka/Modelis.</text:p>
                </text:list-item>
                <text:list-item>
                  <text:p text:style-name="P11">Zem tā stabiņā izkārtoti atlikumi līdz eļļas un siksnas maiņai, kā arī TA datums ar attiecīgajiem krāsu brīdinājumiem (sarkans/oranžs).</text:p>
                </text:list-item>
                <text:list-item>
                  <text:p text:style-name="P12"><text:soft-page-break/><text:span text:style-name="T8">Funkciju pogas mobilajā skatā:</text:span><text:span text:style-name="T9"> K</text:span><text:span text:style-name="T10">atras k</text:span><text:span text:style-name="T9">artītes augšējā labajā stūrī atrodas ikona "Dzēst" (ar obligāto apstiprinājuma logu). </text:span></text:p>
                </text:list-item>
                <text:list-item>
                  <text:p text:style-name="P13"><text:span text:style-name="T11">Transportlīdzekļa pievienošana mobilajā skatā:</text:span><text:span text:style-name="T12"> Mobilajā skatā jauna transportlīdzekļa pievienošanai izmantot apaļu FAB (Floating Action Button) pogu, kurā attēlots tikai "+" simbols. Šai pogai VNMĒR jābūt fiksētai ekrāna apakšējā labajā stūrī, neatkarīgi no tā, cik tālu lapā lietotājs ir norullējis. </text:span><text:span text:style-name="T11">Svarīgi:</text:span><text:span text:style-name="T12"> Šī FAB poga atrodas un ir redzama TIKAI 2. lapā (Dashboard).</text:span><text:span text:style-name="T13"> Uzspiežot uz FAB pogas, lietotājs </text:span><text:span text:style-name="T12">ievada pamata datus (VNZ, Marka/Modelis, TA datums) izlecošā logā, kas pielāgots telefona ekrānam. Pēc saglabāšanas sarakstā parādās jauna, vēl neaizpildīta kartīte.</text:span></text:p>
                  <text:p text:style-name="P14">Uzklikšķinot uz šīs jaunās kartītes, lietotājs tiek aizvests uz 3. lapu (Vēsture). Tā kā ierakstu vēl nav, nostrādā <text:span text:style-name="T3">Smart Onboarding</text:span> un automātiski izlec 4. lapa (Modālais logs), kur lietotājs ievada pirmo nobraukumu un iestata apkopes intervālus.</text:p>
                </text:list-item>
              </text:list>
            </text:list-item>
          </text:list>
        </text:list-item>
      </text:list>
      <text:p text:style-name="P15"/>
      <text:list text:continue-numbering="true" text:style-name="L4">
        <text:list-item>
          <text:list>
            <text:list-item>
              <text:p text:style-name="P16"><text:span text:style-name="T14">Navigācija:</text:span><text:span text:style-name="T15"> </text:span><text:span text:style-name="T12">Ekrāna augšējā labajā stūrī atrodas lietotāja e-pasts un poga '</text:span><text:span text:style-name="T16">Izrakstīties</text:span><text:span text:style-name="T12">' (Log out).</text:span></text:p>
              <text:p text:style-name="P17"/>
            </text:list-item>
          </text:list>
        </text:list-item>
      </text:list>
      <text:list xml:id="list223933621751994" text:continue-list="list223931601758959" text:style-name="L1">
        <text:list-item>
          <text:list>
            <text:list-item>
              <text:p text:style-name="P9"><text:span text:style-name="T1">Vizuālie brīdinājumi (Dinamiskā loģika):</text:span> Iekrāsojas <text:span text:style-name="T3">tikai</text:span> konkrētā termiņa šūna.</text:p>
              <text:list>
                <text:list-item>
                  <text:p text:style-name="P9"><text:span text:style-name="T1">Sarkans:</text:span> Termiņš pārsniegts (0 vai mīnusā).</text:p>
                </text:list-item>
                <text:list-item>
                  <text:p text:style-name="P9"><text:span text:style-name="T1">Oranžs (Auto):</text:span> Atlicis mazāk par 1000 km vai 1 mēnesi.</text:p>
                </text:list-item>
                <text:list-item>
                  <text:p text:style-name="P9"><text:span text:style-name="T1">Oranžs (Moto un īsi intervāli):</text:span> Atlikuši 10% no iestatītā intervāla, lai neradītu viltus trauksmes īsiem apkopes cikliem. <text:span text:style-name="T3">(AI jāaprēķina 10% gan no kilometru, gan mēnešu intervāla. Piemēram: Ja intervāls ir 6000 km, oranžs ieslēdzas pie 600 km atlikuma. Ja intervāls ir 12 mēneši, oranžs ieslēdzas, kad atlikuši ~36 dienas jeb 1.2 mēneši)."</text:span></text:p>
                </text:list-item>
              </text:list>
            </text:list-item>
          </text:list>
        </text:list-item>
        <text:list-item>
          <text:p text:style-name="P4">Lapa 3: Transportlīdzekļa vēsture (Kartīšu lapa)</text:p>
          <text:list>
            <text:list-item>
              <text:p text:style-name="P9">Atveras, uzklikšķinot uz auto rindas Dashboard tabulā.</text:p>
            </text:list-item>
            <text:list-item>
              <text:p text:style-name="P9"><text:span text:style-name="T1">Gudrā atvēršana (Smart Onboarding):</text:span> Ja transportlīdzeklim vēl nav reģistrētas nevienas kartītes, automātiski izlec Lapa 4 (Modālais logs), lai lietotājs varētu ievadīt sākotnējos iestatījumus un pirmo nobraukumu.</text:p>
            </text:list-item>
            <text:list-item>
              <text:p text:style-name="P9"><text:span text:style-name="T1">Kartīšu saraksts:</text:span> Ja transportlīdzeklim jau ir ieraksti, atveras hronoloģisks ierakstu saraksts <text:span text:style-name="T1">kartīšu</text:span> veidā. Jaunākais ieraksts atrodas pašā augšā.</text:p>
              <text:list>
                <text:list-item>
                  <text:p text:style-name="P9">Sarakstā redzami gan pilni remonta ieraksti, gan atsevišķas kartītes, kurās fiksēts tikai nobraukums.</text:p>
                </text:list-item>
                <text:list-item>
                  <text:p text:style-name="P9">Katrai kartītei ir atsevišķa "Edit" (Labot) un "Delete" (Dzēst) poga. Dzēšanai nepieciešams apstiprinājuma logs.</text:p>
                </text:list-item>
              </text:list>
            </text:list-item>
            <text:list-item>
              <text:p text:style-name="P9"><text:span text:style-name="T1">Poga "Pievienot" (Datora un Mobilajā skatā):</text:span></text:p>
            </text:list-item>
          </text:list>
        </text:list-item>
      </text:list>
      <text:list text:style-name="L5">
        <text:list-item>
          <text:list>
            <text:list-item>
              <text:list>
                <text:list-item>
                  <text:p text:style-name="P18"><text:span text:style-name="T1">Datora skatā:</text:span> Lapas augšpusē (virs kartītēm) atrodas skaidri redzama standarta poga "Pievienot jaunu ierakstu".</text:p>
                </text:list-item>
                <text:list-item>
                  <text:p text:style-name="P18"><text:span text:style-name="T1">Mobilajā skatā:</text:span> Klasiskā poga tiek paslēpta, un tās vietā ekrāna apakšējā labajā stūrī parādās fiksēta, apaļa FAB (Floating Action Button) poga.</text:p>
                </text:list-item>
                <text:list-item>
                  <text:p text:style-name="P18"><text:soft-page-break/><text:span text:style-name="T1">Funkcija (Svarīgi AI):</text:span> Abos skatos šī poga atver 4. lapas modālo logu jauna servisa ieraksta izveidei konkrētajam transportlīdzeklim. Tā nesakrīt ar 2. lapas FAB pogu, kas pievieno transportlīdzekli.</text:p>
                </text:list-item>
              </text:list>
            </text:list-item>
          </text:list>
        </text:list-item>
      </text:list>
      <text:list xml:id="list223932516740552" text:continue-list="list223933621751994" text:style-name="L1">
        <text:list-item>
          <text:list>
            <text:list-item>
              <text:p text:style-name="P9"><text:span text:style-name="T1">Datu ielāde un Paginācija:</text:span> Lai optimizētu lietotnes ātrdarbību, vēstures ieraksti jielādē pakāpeniski. Sākotnēji ielādējas <text:span text:style-name="T17">5 jaunākās kartītes</text:span>. Saraksta apakšā jāizmanto bezgalīgā ritināšana (Infinite scroll), kas ielādē nākam<text:span text:style-name="T17">ās</text:span> <text:span text:style-name="T17">kartītes</text:span>, kad lietotājs <text:span text:style-name="T17">vēlas paskatīties vecākus ierakstus</text:span>.</text:p>
            </text:list-item>
          </text:list>
        </text:list-item>
        <text:list-item>
          <text:p text:style-name="P4">Lapa 4: Ievades un iestatījumu modālais logs (Add / Edit Modal)</text:p>
          <text:list>
            <text:list-item>
              <text:p text:style-name="P9">Atveras kā izlecošais logs virs 3. lapas, kad lietotājs vēlas pievienot jaunu ierakstu, labot veco vai (ja tas ir jauns auto) iestatīt sākotnējos intervālus.</text:p>
            </text:list-item>
            <text:list-item>
              <text:p text:style-name="P4">Intervālu iestatījumi un ieteikumi (Tooltips):</text:p>
              <text:list>
                <text:list-item>
                  <text:p text:style-name="P9"><text:span text:style-name="T3">Auto Piedziņa:</text:span> Iespēja atzīmēt – Zobsiksna vai Motora ķēde.</text:p>
                </text:list-item>
                <text:list-item>
                  <text:p text:style-name="P9"><text:span text:style-name="T3">Auto Zobsiksna:</text:span> <text:span text:style-name="T18">Ieteikums – 60 000-200 000 km vai 5-10 gadi.</text:span></text:p>
                </text:list-item>
                <text:list-item>
                  <text:p text:style-name="P9"><text:span text:style-name="T3">Auto Ķēde:</text:span> <text:span text:style-name="T18">Ieteikums – Teorētiski paredzēta visam mūžam, bet ieteicams pārbaudīt pie 200 000 - 300 000 km.</text:span></text:p>
                </text:list-item>
                <text:list-item>
                  <text:p text:style-name="P9"><text:span text:style-name="T3">Auto Eļļa:</text:span> Ieteikums – <text:span text:style-name="T18">10 000-15 000 km vai 1x gadā.</text:span></text:p>
                </text:list-item>
                <text:list-item>
                  <text:p text:style-name="P9"><text:span text:style-name="T3">Moto Eļļa:</text:span> Ieteikums – <text:span text:style-name="T18">3 000-6 000 km vai 1x gadā.</text:span></text:p>
                </text:list-item>
                <text:list-item>
                  <text:p text:style-name="P9"><text:span text:style-name="T3">Moto Ķēde:</text:span> Ieteikums – <text:span text:style-name="T18">Eļļošana 500-1000 km, maiņa ap 20 000 km.</text:span></text:p>
                </text:list-item>
                <text:list-item>
                  <text:p text:style-name="P19"><text:span text:style-name="T19">Moto Kardāns:</text:span><text:span text:style-name="T19"> </text:span><text:span text:style-name="T20">Ieteikums –</text:span><text:span text:style-name="T21"> </text:span><text:span text:style-name="T22">Eļļas maiņa reduktorā vidēji ik pēc 10 000 - 20 000 km vai 1x gadā.</text:span></text:p>
                </text:list-item>
                <text:list-item>
                  <text:p text:style-name="P19"><text:span text:style-name="T19">Moto Siksna:</text:span><text:span text:style-name="T23"> </text:span><text:span text:style-name="T20">Ieteikums – </text:span><text:span text:style-name="T3">Vizuāla pārbaude ik pēc 10 000 km, maiņa vidēji ap 40 000 - 60 000 km (vai ik pēc 5 gadiem).</text:span></text:p>
                  <text:p text:style-name="P20"/>
                </text:list-item>
              </text:list>
            </text:list-item>
            <text:list-item>
              <text:p text:style-name="P4">Datu ievades lauki:</text:p>
              <text:list>
                <text:list-item>
                  <text:p text:style-name="P4">Apkopes intervālu iestatījumi: <text:span text:style-name="T4">Vizuāli atdalīts bloks ar skaitliskiem ievades laukiem (</text:span><text:span text:style-name="T24">Number inputs</text:span><text:span text:style-name="T4">), kur lietotājs ieraksta savus vēlamos intervālus:</text:span></text:p>
                </text:list-item>
              </text:list>
            </text:list-item>
          </text:list>
        </text:list-item>
      </text:list>
      <text:list text:style-name="L6">
        <text:list-item>
          <text:list>
            <text:list-item>
              <text:list>
                <text:list-item>
                  <text:list>
                    <text:list-item>
                      <text:p text:style-name="P21">Eļļas maiņas intervāls (km) un (mēneši).</text:p>
                    </text:list-item>
                    <text:list-item>
                      <text:p text:style-name="P22">Siksnas/Ķēdes maiņas intervāls (km) un (mēneši). </text:p>
                      <text:p text:style-name="P23">(Tieši pie šiem ievades laukiem jāparādās iepriekš minētajiem ieteikumiem / Tooltips).</text:p>
                      <text:p text:style-name="P24"><text:span text:style-name="T25">SVARĪGA PIEZĪME KODA ĢENERATORAM:</text:span><text:span text:style-name="T24"> Šajos laukos ievadītie dati jāsaglabā </text:span><text:span text:style-name="Source_20_Text"><text:span text:style-name="T24">vehicles</text:span></text:span><text:span text:style-name="T24"> tabulā , un tie ir precīzi tie paši mainīgie ("Intervāls km" un "Intervāls mēnešos"), kas obligāti jāizmanto 5. sadaļas matemātiskajās formulās, lai aprēķinātu un attēlotu atlikumus 2. lapas (Dashboard) tabulā.</text:span></text:p>
                    </text:list-item>
                  </text:list>
                </text:list-item>
              </text:list>
            </text:list-item>
          </text:list>
        </text:list-item>
      </text:list>
      <text:p text:style-name="P25"/>
      <text:list xml:id="list223932914853063" text:continue-list="list223932516740552" text:style-name="L1">
        <text:list-item>
          <text:list>
            <text:list-item>
              <text:list>
                <text:list-item>
                  <text:p text:style-name="P9"><text:soft-page-break/><text:span text:style-name="T1">Datums:</text:span> Izmanto <text:span text:style-name="T3">Date Picker</text:span> (kalendāru). Pēc noklusējuma aizpildīts ar šodienas datumu, bet lietotājs to var mainīt uz pagātni.</text:p>
                </text:list-item>
                <text:list-item>
                  <text:p text:style-name="P9"><text:span text:style-name="T1">Odometrs:</text:span> Lietotājs ievada <text:span text:style-name="T1">TIKAI pašreizējo odometra rādījumu</text:span>.</text:p>
                </text:list-item>
                <text:list-item>
                  <text:p text:style-name="P26"><text:span text:style-name="T1">Veiktie darbi (Dinamiskie Checkboxes):</text:span> Darbu izvēles rūtiņām jāpielāgojas transportlīdzekļa tipam:</text:p>
                </text:list-item>
              </text:list>
            </text:list-item>
          </text:list>
        </text:list-item>
      </text:list>
      <text:list text:style-name="L7">
        <text:list-item>
          <text:list>
            <text:list-item>
              <text:list>
                <text:list-item>
                  <text:p text:style-name="P27"><text:span text:style-name="T1">Ja Auto:</text:span> Parādīt <text:span text:style-name="T3">Checkbox</text:span> "Eļļas maiņa" un "Siksnas/Ķēdes maiņa".</text:p>
                </text:list-item>
                <text:list-item>
                  <text:p text:style-name="P27"><text:span text:style-name="T1">Ja Moto:</text:span> Parādīt <text:span text:style-name="T3">Checkbox</text:span> "Eļļas maiņa", "Siksnas maiņa", "Ķēdes apkope/maiņa", "Kardāna eļļas maiņa".</text:p>
                </text:list-item>
              </text:list>
            </text:list-item>
          </text:list>
        </text:list-item>
      </text:list>
      <text:list text:continue-list="list223932914853063" text:style-name="L1">
        <text:list-item>
          <text:list>
            <text:list-item>
              <text:list>
                <text:list-item>
                  <text:p text:style-name="P28"><text:span text:style-name="T1">Dinamiskie filtri (Checkboxes):</text:span> </text:p>
                  <text:list>
                    <text:list-item>
                      <text:p text:style-name="P28">Ja tas ir Auto, parādās Eļļas, Gaisa, Salona un Degvielas filtri</text:p>
                    </text:list-item>
                    <text:list-item>
                      <text:p text:style-name="P28">Ja tas ir Moto, parādās Eļļas un Gaisa filtri.</text:p>
                    </text:list-item>
                  </text:list>
                </text:list-item>
                <text:list-item>
                  <text:p text:style-name="P9"><text:span text:style-name="T1">Apraksts un Izmaksas:</text:span> Brīva teksta ievade un ciparu lauks.</text:p>
                </text:list-item>
                <text:list-item>
                  <text:p text:style-name="P29"><text:span text:style-name="T1">Dokumentācija (Bilžu augšupielāde):</text:span> Lietotājs var augšupielādēt līdz pat <text:span text:style-name="T1">5 attēliem</text:span> (čekiem, rēķiniem, bildēm) vienam remonta ierakstam. Modālajā logā skaidri jāparāda, cik bildes jau ir pievienotas (piem., 2/5). </text:p>
                  <text:list>
                    <text:list-item>
                      <text:p text:style-name="P29"><text:span text:style-name="T1">Vizuālais attēlojums:</text:span> Visām pievienotajām bildēm (gan priekšskatījumā 4. lapā, gan apskatot tās 3. lapā) jābūt vizuāli vienādos izmēros un proporcijās (piemēram, kvadrāta formā, izmantojot CSS <text:span text:style-name="Source_20_Text">object-fit: cover</text:span>), lai tās neizjauktu lapas izkārtojumu neatkarīgi no oriģinālā attēla izmēra vai proporcijas. Jābūt iespējai uzklikšķināt uz bildes, lai to atvērtu pilnā izmērā.</text:p>
                    </text:list-item>
                    <text:list-item>
                      <text:p text:style-name="P29"><text:span text:style-name="T1">Ierobežojumi:</text:span> Atļautie formāti ir .JPG, .JPEG un .PNG. Maksimālais viena faila izmērs ir 10MB.</text:p>
                    </text:list-item>
                    <text:list-item>
                      <text:p text:style-name="P30"><text:span text:style-name="T1">Vizuālā attēlu dzēšana (UI):</text:span> Modālajā logā atverot ierakstu labošanai (Edit), zem failu pievienošanas lauka ir redzams jau augšupielādēto attēlu priekšskatījumu (thumbnails) režģis. Katra attēla augšējā labajā stūrī (pārklājoties pāri attēlam) jāatrodas skaidri saskatāmai dzēšanas ikonai – sarkanai "X" pogai. Nospiežot šo ikonu, attēls vizuāli tiek noņemts no priekšskatījuma režģa un atbrīvojas vieta jaunai bildei.</text:p>
                    </text:list-item>
                  </text:list>
                </text:list-item>
              </text:list>
            </text:list-item>
          </text:list>
        </text:list-item>
      </text:list>
      <text:p text:style-name="P31"><text:span text:style-name="T26"><text:tab/><text:tab/>Obligātie lauki:</text:span><text:span text:style-name="T3"> </text:span><text:span text:style-name="T9">'Datums' un 'Odometrs' ir obligāti aizpildāmi lauki. Pārējie lauki nav obligāti.</text:span></text:p>
      <text:p text:style-name="Text_20_body"/>
      <text:p text:style-name="Text_20_body"><text:bookmark text:name="p-rc_24a0f5f9ec91dc93-50"/><text:span text:style-name="T27">4. Datu modelis (Supabase / PostgreSQL struktūra):</text:span> Sistēma izmanto relāciju SQL datubāzi ar saistītām tabulām, izmantojot ārējās atslēgas (Foreign Keys). Lietotāju autentifikācijai tiek izmantota iebūvētā <text:span text:style-name="Source_20_Text">Supabase Auth</text:span> sistēma.</text:p>
      <text:list text:style-name="L8">
        <text:list-item>
          <text:p text:style-name="P32"><text:bookmark text:name="p-rc_24a0f5f9ec91dc93-51"/><text:span text:style-name="T1">Lietotāji (Supabase Auth - auth.users):</text:span> </text:p>
          <text:list>
            <text:list-item>
              <text:p text:style-name="P32"><text:bookmark text:name="p-rc_24a0f5f9ec91dc93-52"/><text:soft-page-break/><text:span text:style-name="Source_20_Text">id</text:span>: UUID (Sistēmas ģenerēts unikāls identifikators) </text:p>
            </text:list-item>
            <text:list-item>
              <text:p text:style-name="P32"><text:bookmark text:name="p-rc_24a0f5f9ec91dc93-53"/><text:span text:style-name="Source_20_Text">email</text:span>: VARCHAR (E-pasts pieteikšanās nolūkiem) </text:p>
            </text:list-item>
            <text:list-item>
              <text:p text:style-name="P32"><text:bookmark text:name="p-rc_24a0f5f9ec91dc93-54"/><text:span text:style-name="T3">Piezīme koda ģeneratoram: Parole tiek droši glabāta Supabase Auth, atsevišķa tabula parolēm nav jāveido.</text:span> </text:p>
            </text:list-item>
          </text:list>
        </text:list-item>
        <text:list-item>
          <text:p text:style-name="P32"><text:bookmark text:name="p-rc_24a0f5f9ec91dc93-55"/><text:span text:style-name="T1">Transportlīdzekļi (vehicles tabula):</text:span> </text:p>
          <text:list>
            <text:list-item>
              <text:p text:style-name="P32"><text:bookmark text:name="p-rc_24a0f5f9ec91dc93-56"/><text:span text:style-name="Source_20_Text">id</text:span>: UUID (Primary Key) </text:p>
            </text:list-item>
            <text:list-item>
              <text:p text:style-name="P32"><text:bookmark text:name="p-rc_24a0f5f9ec91dc93-57"/><text:span text:style-name="Source_20_Text">user_id</text:span>: UUID (Foreign Key, kas norāda uz <text:span text:style-name="Source_20_Text">auth.users.id</text:span>. Iestatījums: <text:span text:style-name="Source_20_Text">ON DELETE CASCADE</text:span> – dzēšot lietotāju, izdzēšas viņa auto) </text:p>
            </text:list-item>
            <text:list-item>
              <text:p text:style-name="P32"><text:bookmark text:name="p-rc_24a0f5f9ec91dc93-58"/><text:span text:style-name="Source_20_Text">type</text:span>: VARCHAR (Pieļaujamās vērtības: "Auto" vai "Moto") </text:p>
            </text:list-item>
            <text:list-item>
              <text:p text:style-name="P32"><text:bookmark text:name="p-rc_24a0f5f9ec91dc93-59"/><text:span text:style-name="Source_20_Text">brand_model</text:span>: VARCHAR (Marka/Modelis) </text:p>
            </text:list-item>
            <text:list-item>
              <text:p text:style-name="P32"><text:bookmark text:name="p-rc_24a0f5f9ec91dc93-60"/><text:span text:style-name="Source_20_Text">plate_number</text:span>: VARCHAR (Numura zīme - VNZ) </text:p>
            </text:list-item>
            <text:list-item>
              <text:p text:style-name="P32"><text:bookmark text:name="p-rc_24a0f5f9ec91dc93-61"/><text:span text:style-name="Source_20_Text">inspection_date</text:span>: DATE (Apskates datums) </text:p>
            </text:list-item>
            <text:list-item>
              <text:p text:style-name="P32"><text:bookmark text:name="p-rc_24a0f5f9ec91dc93-62"/><text:span text:style-name="Source_20_Text">engine_drive_type</text:span>: VARCHAR (Pieļaujamās vērtības: Zobsiksna/Ķēde/Siksna/Kardāns) </text:p>
            </text:list-item>
            <text:list-item>
              <text:p text:style-name="P32"><text:bookmark text:name="p-rc_24a0f5f9ec91dc93-63"/><text:span text:style-name="Source_20_Text">oil_interval_km</text:span>: INTEGER (Eļļas intervāls km) </text:p>
            </text:list-item>
            <text:list-item>
              <text:p text:style-name="P32"><text:bookmark text:name="p-rc_24a0f5f9ec91dc93-64"/><text:span text:style-name="Source_20_Text">oil_interval_months</text:span>: INTEGER (Eļļas intervāls mēnešos) </text:p>
            </text:list-item>
            <text:list-item>
              <text:p text:style-name="P32"><text:bookmark text:name="p-rc_24a0f5f9ec91dc93-65"/><text:span text:style-name="Source_20_Text">belt_interval_km</text:span>: INTEGER (Siksnas intervāls km) </text:p>
            </text:list-item>
            <text:list-item>
              <text:p text:style-name="P32"><text:bookmark text:name="p-rc_24a0f5f9ec91dc93-66"/><text:span text:style-name="Source_20_Text">belt_interval_months</text:span>: INTEGER (Siksnas intervāls mēnešos) </text:p>
            </text:list-item>
            <text:list-item>
              <text:p text:style-name="P33"><text:span text:style-name="Source_20_Text">created_at</text:span>: TIMESTAMP (Ieraksta izveides laiks)</text:p>
            </text:list-item>
            <text:list-item>
              <text:p text:style-name="P33"><text:span text:style-name="T3">RLS Noteikums:</text:span> Lietotājs var lasīt/rakstīt tikai tās rindas, kur <text:span text:style-name="Source_20_Text">user_id</text:span> sakrīt ar viņa <text:span text:style-name="Source_20_Text">auth.uid()</text:span>.</text:p>
            </text:list-item>
          </text:list>
        </text:list-item>
        <text:list-item>
          <text:p text:style-name="P32"><text:bookmark text:name="p-rc_24a0f5f9ec91dc93-67"/><text:span text:style-name="T1">Servisa ieraksti (service_logs tabula):</text:span> </text:p>
          <text:list>
            <text:list-item>
              <text:p text:style-name="P32"><text:bookmark text:name="p-rc_24a0f5f9ec91dc93-68"/><text:span text:style-name="Source_20_Text">id</text:span>: UUID (Primary Key) </text:p>
            </text:list-item>
            <text:list-item>
              <text:p text:style-name="P32"><text:bookmark text:name="p-rc_24a0f5f9ec91dc93-69"/><text:span text:style-name="Source_20_Text">vehicle_id</text:span>: UUID (Foreign Key, kas norāda uz <text:span text:style-name="Source_20_Text">vehicles.id</text:span>. Iestatījums: <text:span text:style-name="Source_20_Text">ON DELETE CASCADE</text:span> – dzēšot auto, izdzēšas visi tā remonta ieraksti) </text:p>
            </text:list-item>
            <text:list-item>
              <text:p text:style-name="P32"><text:bookmark text:name="p-rc_24a0f5f9ec91dc93-70"/><text:span text:style-name="Source_20_Text">date</text:span>: DATE (Ieraksta datums) </text:p>
            </text:list-item>
            <text:list-item>
              <text:p text:style-name="P32"><text:bookmark text:name="p-rc_24a0f5f9ec91dc93-71"/><text:span text:style-name="Source_20_Text">mileage</text:span>: INTEGER (Nobraukums/Odometrs) </text:p>
            </text:list-item>
            <text:list-item>
              <text:p text:style-name="P32"><text:bookmark text:name="p-rc_24a0f5f9ec91dc93-72"/><text:span text:style-name="Source_20_Text">is_oil_changed</text:span>: BOOLEAN (Noklusējums: false) </text:p>
            </text:list-item>
            <text:list-item>
              <text:p text:style-name="P32"><text:bookmark text:name="p-rc_24a0f5f9ec91dc93-73"/><text:span text:style-name="Source_20_Text">is_belt_changed</text:span>: BOOLEAN (Noklusējums: false) </text:p>
            </text:list-item>
            <text:list-item>
              <text:p text:style-name="P32"><text:bookmark text:name="p-rc_24a0f5f9ec91dc93-74"/><text:span text:style-name="Source_20_Text">is_air_filter</text:span>: BOOLEAN (Noklusējums: false) </text:p>
            </text:list-item>
            <text:list-item>
              <text:p text:style-name="P32"><text:bookmark text:name="p-rc_24a0f5f9ec91dc93-75"/><text:span text:style-name="Source_20_Text">is_cabin_filter</text:span>: BOOLEAN (Noklusējums: false) </text:p>
            </text:list-item>
            <text:list-item>
              <text:p text:style-name="P32"><text:bookmark text:name="p-rc_24a0f5f9ec91dc93-76"/><text:span text:style-name="Source_20_Text">is_fuel_filter</text:span>: BOOLEAN (Noklusējums: false) </text:p>
            </text:list-item>
            <text:list-item>
              <text:p text:style-name="P32"><text:soft-page-break/><text:span text:style-name="Source_20_Text">is_chain_maintained: BOOLEAN (Noklusējums: false)</text:span> <text:span text:style-name="T3">(Paredzēts moto ķēdes apkopei)</text:span></text:p>
            </text:list-item>
            <text:list-item>
              <text:p text:style-name="P34"><text:span text:style-name="Source_20_Text">is_cardan_oil_changed: BOOLEAN (Noklusējums: false)</text:span> (Paredzēts moto kardāna eļļai)</text:p>
            </text:list-item>
            <text:list-item>
              <text:p text:style-name="P32"><text:bookmark text:name="p-rc_24a0f5f9ec91dc93-77"/><text:span text:style-name="Source_20_Text">description</text:span>: TEXT (Apraksts) </text:p>
            </text:list-item>
            <text:list-item>
              <text:p text:style-name="P32"><text:bookmark text:name="p-rc_24a0f5f9ec91dc93-78"/><text:span text:style-name="Source_20_Text">cost</text:span>: DECIMAL (Izmaksas - precīziem cipariem ar komatu) </text:p>
            </text:list-item>
            <text:list-item>
              <text:p text:style-name="P32"><text:span text:style-name="T28">image_urls: TEXT[]</text:span><text:span text:style-name="T4"> </text:span>(Teksta masīvs jeb Array of strings. Saturēs URL saites no Supabase Storage, jo vienam ierakstam var būt līdz 5 bildēm).</text:p>
            </text:list-item>
            <text:list-item>
              <text:p text:style-name="P33"><text:span text:style-name="Source_20_Text">created_at</text:span>: TIMESTAMP</text:p>
            </text:list-item>
            <text:list-item>
              <text:p text:style-name="P33"><text:span text:style-name="T3">RLS Noteikums:</text:span> Lietotājs var lasīt/rakstīt ierakstus tikai tad, ja tie piesaistīti transportlīdzeklim, kas pieder viņam.</text:p>
            </text:list-item>
          </text:list>
        </text:list-item>
        <text:list-item>
          <text:p text:style-name="P35">Failu krātuve (Supabase Storage):</text:p>
          <text:list>
            <text:list-item>
              <text:p text:style-name="P33"><text:span text:style-name="T29">Izveidot</text:span> atsevišķu Storage Bucket (piemēram, ar nosaukumu <text:span text:style-name="Source_20_Text">service_images</text:span>), kurā fiziski tiks glabāti visi ar apkopi saistītie attēli – čeki, rēķini, iegādāto detaļu foto, kā arī paša remonta procesa vai bojājumu bildes. Datubāzes <text:span text:style-name="Source_20_Text">service_logs</text:span> tabulā glabājas tikai publiskā saite (<text:span text:style-name="Source_20_Text">image_url</text:span>) uz šo failu.</text:p>
            </text:list-item>
            <text:list-item>
              <text:p text:style-name="P36"><text:span text:style-name="T30">I</text:span><text:span text:style-name="T4">zveido</text:span><text:span text:style-name="T30">t</text:span><text:span text:style-name="T4"> droša</text:span><text:span text:style-name="T30">s</text:span><text:span text:style-name="T4"> dzēšanas plūsm</text:span><text:span text:style-name="T30">u</text:span><text:span text:style-name="T4"> Frontend (React) pusē. Kad lietotājs dzēš servisa ierakstu no </text:span><text:span text:style-name="Source_20_Text"><text:span text:style-name="T4">service_logs</text:span></text:span><text:span text:style-name="T4"> tabulas (vai izdzēš visu transportlīdzekli no </text:span><text:span text:style-name="Source_20_Text"><text:span text:style-name="T4">vehicles</text:span></text:span><text:span text:style-name="T4"> tabulas), React aplikācijai vispirms ir jānosūta API pieprasījums izdzēst piesaistītos attēlus fiziski no </text:span><text:span text:style-name="Source_20_Text"><text:span text:style-name="T4">service_images</text:span></text:span><text:span text:style-name="T4"> Storage spaiņa, un tikai pēc veiksmīgas failu izdzēšanas jāveic datubāzes ieraksta dzēšana. Tas nepieciešams, lai Storage neuzkrātu bāreņfailus.</text:span></text:p>
              <text:p text:style-name="P36"/>
            </text:list-item>
            <text:list-item>
              <text:p text:style-name="P36">Ja lietotājs 4. lapas modālajā logā rediģē ierakstu un izdzēš tikai vienu no pievienotajiem attēliem, React (Frontend) nekavējoties jānosūta dzēšanas pieprasījums uz Supabase Storage pirms datubāzes atjaunināšanas.</text:p>
            </text:list-item>
          </text:list>
        </text:list-item>
      </text:list>
      <text:p text:style-name="Text_20_body"/>
      <text:p text:style-name="Text_20_body"><text:bookmark text:name="p-rc_d48ac47bde74f2ea-483"/><text:span text:style-name="T1">5. Sistēmas matemātika un aprēķinu loģika</text:span> Lietotājam nav jāveic aprēķini. Pievienojot jebkuru jaunu odometra rādījumu, sistēma atrod pēdējo vēstures ierakstu, kurā veikta konkrētā darbība, un veic divus paralēlus aprēķinus: </text:p>
      <text:p text:style-name="Text_20_body"><text:span text:style-name="T1">Piezīme: </text:span><text:span text:style-name="T4">"Pēdējās maiņas km" ir nobraukums no datuma ziņā jaunākā ieraksta, kurā attiecīgais checkbox (piem., </text:span><text:span text:style-name="Source_20_Text"><text:span text:style-name="T4">is_oil_changed</text:span></text:span><text:span text:style-name="T4">) ir atzīmēts kā </text:span><text:span text:style-name="Source_20_Text"><text:span text:style-name="T4">true</text:span></text:span><text:span text:style-name="T4">. </text:span>Savukārt "Pašreizējais odometrs" tiek definēts kā nobraukuma rādītājs no hronoloģiski (pēc datuma) <text:span text:style-name="T4">jaunākā reģistrētā ieraksta</text:span><text:span text:style-name="T4"> </text:span>transportlīdzekļa vēsturē. Tas nodrošina, ka vēsturisku ierakstu (vecu čeku) pievienošana vai iespējamas drukas kļūdas vecākos ierakstos nesabojā aktuālā atlikuma aprēķinus.</text:p>
      <text:list xml:id="list701628442" text:style-name="L9">
        <text:list-item>
          <text:p text:style-name="P37"><text:bookmark text:name="p-rc_d48ac47bde74f2ea-484"/><text:span text:style-name="T27">Aprēķina formula nobraukumam (km): </text:span>(Pēdējās maiņas km + Intervāls km) - Pašreizējais odometrs = Atlikums kilometros. </text:p>
        </text:list-item>
        <text:list-item>
          <text:p text:style-name="P38"><text:bookmark text:name="p-rc_d48ac47bde74f2ea-485"/><text:span text:style-name="T27">Aprēķina formula laikam (mēneši/gadi):</text:span> (Pēdējās maiņas datums + Intervāls mēnešos) - Sistēmas šodienas datums (Current_Date) = Atlikušais laiks. (Kombinētā brīdinājuma loģika Dashboardā: Krāsa iekrāsojas pēc tā kritērija (km vai laiks), kurš iestājas pirmais). <text:span text:style-name="T4">Rezultāts </text:span><text:soft-page-break/><text:span text:style-name="T4">Dashboard tabulā (un mobilajās kartītēs) vienmēr jāattēlo kombinēti, vienā šūnā/rindā parādot abus atlikumus. Piemēram: "</text:span><text:span text:style-name="T4">5000 km / 5 mēneši</text:span><text:span text:style-name="T4">". Ja laika atlikums ir mazāks par 30 dienām, mēnešu vietā jāattēlo dienas, piemēram: "</text:span><text:span text:style-name="T4">1200 km / 12 dienas</text:span><text:span text:style-name="T4">". Iekrāsojas tas parametrs, kurš iestājas pirmais saskaņā ar brīdinājuma loģiku.</text:span></text:p>
          <text:p text:style-name="P39"/>
          <text:p text:style-name="P40"><text:span text:style-name="T31">Datu un mainīgo sasaiste aprēķiniem (Norāde koda ģeneratoram):</text:span><text:span text:style-name="T4"> Lai pareizi atrastu atskaites punktus ("Pēdējās maiņas km" un "Pēdējās maiņas datums") 2. lapas Dashboard aprēķiniem, koda ģeneratoram stingri jāievēro šāda lauku sasaiste:</text:span></text:p>
          <text:list>
            <text:list-item>
              <text:p text:style-name="P40"><text:span text:style-name="T1">Eļļas atlikuma aprēķinam:</text:span> Datubāzē <text:span text:style-name="Source_20_Text">service_logs</text:span> tabulā jāmeklē jaunākais ieraksts, kur <text:span text:style-name="Source_20_Text">is_oil_changed == true</text:span>. Aprēķina formulā jāpieskaita <text:span text:style-name="Source_20_Text">vehicles</text:span> tabulas lauki <text:span text:style-name="Source_20_Text">oil_interval_km</text:span> un <text:span text:style-name="Source_20_Text">oil_interval_months</text:span>.</text:p>
            </text:list-item>
          </text:list>
        </text:list-item>
      </text:list>
      <text:list text:style-name="L10">
        <text:list-item>
          <text:list>
            <text:list-item>
              <text:p text:style-name="P41"><text:span text:style-name="T1">Siksnas / Ķēdes atlikuma aprēķinam:</text:span> Datubāzē <text:span text:style-name="Source_20_Text">service_logs</text:span> tabulā jāmeklē jaunākais ieraksts, kur <text:span text:style-name="Source_20_Text">is_belt_changed == true</text:span> VAI <text:span text:style-name="Source_20_Text">is_chain_maintained == true</text:span>. Aprēķina formulā abos gadījumos jāpieskaita <text:span text:style-name="Source_20_Text">vehicles</text:span> tabulas lauki <text:span text:style-name="Source_20_Text">belt_interval_km</text:span> un <text:span text:style-name="Source_20_Text">belt_interval_months</text:span>.</text:p>
            </text:list-item>
          </text:list>
        </text:list-item>
      </text:list>
      <text:list text:continue-list="list701628442" text:style-name="L9">
        <text:list-header>
          <text:p text:style-name="P42"/>
        </text:list-header>
        <text:list-item>
          <text:p text:style-name="P37"><text:span text:style-name="T1">Datu validācija un Tukšie dati (Edge cases):</text:span> </text:p>
        </text:list-item>
      </text:list>
      <text:list text:style-name="L11">
        <text:list-item>
          <text:list>
            <text:list-item>
              <text:p text:style-name="P43"><text:bookmark text:name="p-rc_d48ac47bde74f2ea-487"/><text:span text:style-name="T27">Tukšie dati: </text:span>Ja transportlīdzeklim vēl nav ievadīts nevienas apkopes ieraksts (nav atskaites punkta nobraukumam vai datumam), Dashboard tabulā atlikuma šūnās attēlojams teksts “Nav datu”. Šūna neiekrāsojas nevienā brīdinājuma krāsā, līdz netiek pievienots pirmais atskaites ieraksts. </text:p>
            </text:list-item>
          </text:list>
          <text:p text:style-name="P43"/>
          <text:list text:continue-numbering="true">
            <text:list-item>
              <text:p text:style-name="P44"><text:bookmark text:name="p-rc_d48ac47bde74f2ea-488"/><text:span text:style-name="T27">Nobraukuma validācija: </text:span>Pievienojot jaunu servisa ierakstu (Lapa 4), sistēmai jāpārbauda odometra rādījums pret iepriekšējo vēstures ierakstu. Ja lietotājs ievada odometra rādījumu, kas ir MAZĀKS par pēdējo reģistrēto šī transportlīdzekļa nobraukumu, sistēma neļauj saglabāt ierakstu un parāda kļūdas paziņojumu: "Kļūda: Jaunais nobraukums nevar būt mazāks par iepriekš reģistrēto!" </text:p>
              <text:p text:style-name="P44"><text:span text:style-name="T1">Piezīme: </text:span><text:span text:style-name="T4">Šī kļūdas validācija drīkst tikt piemērota TIKAI tad, ja lietotāja ievadītais ieraksta datums ir vienāds vai lielāks par pēdējo ierakstu datubāzē. Tas nepieciešams, lai ļautu lietotājam ievadīt vēsturiskus (aizmirstus) čekus ar agrākiem datumiem un attiecīgi mazākiem odometra rādījumiem.</text:spa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use-window-font-color="true" loext:opacity="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6T12:50:17.967287216</meta:creation-date>
    <dc:date>2026-03-16T22:32:21.553633063</dc:date>
    <meta:editing-duration>PT1H1M7S</meta:editing-duration>
    <meta:editing-cycles>11</meta:editing-cycles>
    <meta:generator>LibreOffice/25.8.5.2$Linux_X86_64 LibreOffice_project/580$Build-2</meta:generator>
    <meta:document-statistic meta:table-count="0" meta:image-count="0" meta:object-count="0" meta:page-count="8" meta:paragraph-count="137" meta:word-count="2413" meta:character-count="17650" meta:non-whitespace-character-count="15443"/>
  </office:meta>
</office:document-meta>
</file>